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1pt" fo:font-style="italic" fo:font-weight="bold" officeooo:rsid="002e5004" officeooo:paragraph-rsid="002e5004" style:font-size-asian="21pt" style:font-style-asian="italic" style:font-weight-asian="bold" style:font-size-complex="21pt" style:font-style-complex="italic" style:font-weight-complex="bold"/>
    </style:style>
    <style:style style:name="P2" style:family="paragraph" style:parent-style-name="Standard">
      <style:paragraph-properties fo:text-align="start" style:justify-single-word="false"/>
      <style:text-properties fo:font-size="15pt" fo:font-style="normal" fo:font-weight="bold" officeooo:rsid="0026dcb6" officeooo:paragraph-rsid="0026dcb6"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fo:font-size="15pt" fo:font-style="normal" fo:font-weight="bold" officeooo:rsid="00189b21" officeooo:paragraph-rsid="00189b21"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fo:font-size="15pt" fo:font-style="normal" fo:font-weight="bold" officeooo:rsid="00142d26" officeooo:paragraph-rsid="00142d26"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fo:font-size="15pt" fo:font-style="normal" fo:font-weight="bold" officeooo:rsid="002884b9" officeooo:paragraph-rsid="002884b9" style:font-size-asian="13.1000003814697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fo:font-size="15pt" fo:font-style="normal" fo:font-weight="bold" officeooo:rsid="00142d26" officeooo:paragraph-rsid="00189b21"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fo:font-size="15pt" fo:font-style="normal" fo:font-weight="bold" officeooo:rsid="0029c085" officeooo:paragraph-rsid="0029c085" style:font-size-asian="13.1000003814697pt" style:font-style-asian="normal" style:font-weight-asian="bold" style:font-size-complex="15pt" style:font-style-complex="normal" style:font-weight-complex="bold"/>
    </style:style>
    <style:style style:name="P8" style:family="paragraph" style:parent-style-name="Standard">
      <style:paragraph-properties fo:text-align="start" style:justify-single-word="false"/>
      <style:text-properties fo:font-size="15pt" fo:font-style="normal" fo:font-weight="bold" officeooo:rsid="0015db98" officeooo:paragraph-rsid="0015db98"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fo:font-size="15pt" fo:font-style="normal" fo:font-weight="bold" officeooo:rsid="002a5f88" officeooo:paragraph-rsid="002a5f88" style:font-size-asian="13.1000003814697pt" style:font-style-asian="normal" style:font-weight-asian="bold" style:font-size-complex="15pt" style:font-style-complex="normal" style:font-weight-complex="bold"/>
    </style:style>
    <style:style style:name="P10" style:family="paragraph" style:parent-style-name="Standard">
      <style:paragraph-properties fo:text-align="start" style:justify-single-word="false"/>
      <style:text-properties fo:font-size="15pt" fo:font-style="normal" fo:font-weight="bold" officeooo:rsid="002e68d8" officeooo:paragraph-rsid="002e68d8"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fo:font-size="15pt" fo:font-style="normal" fo:font-weight="bold" officeooo:rsid="002ba206" officeooo:paragraph-rsid="002ba206" style:font-size-asian="13.1000003814697pt" style:font-style-asian="normal" style:font-weight-asian="bold" style:font-size-complex="15pt" style:font-style-complex="normal" style:font-weight-complex="bold"/>
    </style:style>
    <style:style style:name="T1" style:family="text">
      <style:text-properties officeooo:rsid="002a5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RSE CODE ENCODER</text:p>
      <text:p text:style-name="P1">Documentation</text:p>
      <text:p text:style-name="P2"/>
      <text:p text:style-name="P2">The goal of this project was to create a morse code encoder, which will use a buzzer to beep the code.</text:p>
      <text:p text:style-name="P3"/>
      <text:p text:style-name="P2">I am using an ESP32 DevKit, with an active buzzer. It’s running native rust with the embassy framework for asynchronousness.</text:p>
      <text:p text:style-name="P4"/>
      <text:p text:style-name="P2">The code consists of two separate versions, one where the whole codebase is in a single file, and one where the actual beeping and calculations are stored in a different file. At first, the code initializes the embassy timer, then the pin (GPIO33 in the code, D33 on the ESP) for the buzzer to use. Then the user is able to set the WPM (words per minute), the speed of the “beeping”, and the message that will be converted to morse code. The external morse function takes care of converting, using a match statement for each letter (char variable) inside the &amp;str varibale. The function takes 3 arguments: speed: u64 is the wpm we set at the beginning; text: &amp;’static str is the message we set; and buzzer: Output&lt;’static&gt; is the reference to the buzzer pin, so the function can directly change change its state.</text:p>
      <text:p text:style-name="P4"/>
      <text:p text:style-name="P5">Since it’s a fairly simple project I’m not using any custom error handling, only the one rust’s compiler provides by default.</text:p>
      <text:p text:style-name="P6"/>
      <text:p text:style-name="P7">For the ordinary person, if the message if pre-set, it is as simple as plugging it to a power source, whether it is a battery or a 5V usb-c connector.</text:p>
      <text:p text:style-name="P4"/>
      <text:p text:style-name="P7">Upsides: ease of use; virtually no chance of failure; beginner friendliness</text:p>
      <text:p text:style-name="P7"><text:soft-page-break/></text:p>
      <text:p text:style-name="P7">Downsides: ordinary person can’t easily change the message as it would require having the original source code and flashing the ESP; <text:span text:style-name="T1">wery limited features; too simple for use other than of general joy and showoff</text:span></text:p>
      <text:p text:style-name="P8"/>
      <text:p text:style-name="P9">The entire code was written by Kristóf Rajnai</text:p>
      <text:p text:style-name="P8"/>
      <text:p text:style-name="P10">I sadly didn’t have the chance to measure it, as I’m not in possession of a multi-meter.</text:p>
      <text:p text:style-name="P8"/>
      <text:p text:style-name="P11">For the future I’d like to implement a WiFi system so the ordinary user too can set the message and WP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9T22:53:57.824302694</meta:creation-date>
    <dc:date>2026-06-19T10:26:25.105877422</dc:date>
    <meta:editing-duration>PT57M54S</meta:editing-duration>
    <meta:editing-cycles>20</meta:editing-cycles>
    <meta:generator>LibreOffice/25.8.7.3$Linux_X86_64 LibreOffice_project/580$Build-3</meta:generator>
    <meta:document-statistic meta:table-count="0" meta:image-count="0" meta:object-count="0" meta:page-count="2" meta:paragraph-count="12" meta:word-count="333" meta:character-count="1868" meta:non-whitespace-character-count="1547"/>
  </office:meta>
</office:document-meta>
</file>